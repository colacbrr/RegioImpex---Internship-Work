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a3c29" officeooo:paragraph-rsid="000a3c29" style:font-size-asian="15.75pt" style:font-size-complex="18pt"/>
    </style:style>
    <style:style style:name="P2" style:family="paragraph" style:parent-style-name="Standard">
      <style:paragraph-properties fo:text-align="start" style:justify-single-word="false"/>
      <style:text-properties fo:font-size="12pt" officeooo:rsid="000a3c29" officeooo:paragraph-rsid="000a3c29" style:font-size-asian="10.5pt" style:font-size-complex="12pt"/>
    </style:style>
    <style:style style:name="P3" style:family="paragraph" style:parent-style-name="Standard">
      <style:paragraph-properties fo:text-align="start" style:justify-single-word="false"/>
      <style:text-properties fo:font-size="12pt" officeooo:rsid="000a7419" officeooo:paragraph-rsid="000a7419" style:font-size-asian="10.5pt" style:font-size-complex="12pt"/>
    </style:style>
    <style:style style:name="P4" style:family="paragraph" style:parent-style-name="Standard">
      <style:paragraph-properties fo:text-align="start" style:justify-single-word="false"/>
      <style:text-properties fo:font-size="12pt" officeooo:rsid="000afd79" officeooo:paragraph-rsid="000afd79" style:font-size-asian="10.5pt" style:font-size-complex="12pt"/>
    </style:style>
    <style:style style:name="P5" style:family="paragraph" style:parent-style-name="Standard">
      <style:paragraph-properties fo:text-align="start" style:justify-single-word="false"/>
      <style:text-properties fo:font-size="12pt" officeooo:rsid="000b31a4" officeooo:paragraph-rsid="000b31a4" style:font-size-asian="10.5pt" style:font-size-complex="12pt"/>
    </style:style>
    <style:style style:name="P6" style:family="paragraph" style:parent-style-name="Standard">
      <style:paragraph-properties fo:text-align="start" style:justify-single-word="false"/>
      <style:text-properties fo:font-size="12pt" officeooo:rsid="000b4e6a" officeooo:paragraph-rsid="000b4e6a" style:font-size-asian="10.5pt" style:font-size-complex="12pt"/>
    </style:style>
    <style:style style:name="P7" style:family="paragraph" style:parent-style-name="Standard">
      <style:paragraph-properties fo:text-align="start" style:justify-single-word="false"/>
      <style:text-properties fo:font-size="12pt" officeooo:rsid="000c20c0" officeooo:paragraph-rsid="000c20c0" style:font-size-asian="10.5pt" style:font-size-complex="12pt"/>
    </style:style>
    <style:style style:name="P8" style:family="paragraph" style:parent-style-name="Standard">
      <style:paragraph-properties fo:text-align="start" style:justify-single-word="false"/>
      <style:text-properties fo:font-size="12pt" officeooo:rsid="000d6ae9" officeooo:paragraph-rsid="000d6ae9" style:font-size-asian="10.5pt" style:font-size-complex="12pt"/>
    </style:style>
    <style:style style:name="T1" style:family="text">
      <style:text-properties officeooo:rsid="000b4e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urt Rezumat de Idei</text:p>
      <text:p text:style-name="P1">(cu Prof. Dumitru Bortun)</text:p>
      <text:p text:style-name="P1"/>
      <text:p text:style-name="P1"/>
      <text:p text:style-name="P1"/>
      <text:p text:style-name="P1"/>
      <text:p text:style-name="P2">“Nu coborati de pe planeta. O putem face mai buna si cu mai multa comunicare.”</text:p>
      <text:p text:style-name="P2"><text:tab/><text:tab/><text:tab/><text:tab/>(Mihai Morar)</text:p>
      <text:p text:style-name="P2"/>
      <text:p text:style-name="P2">Prof. SNSPA, Dr. Filozofie, Dumitru Bortun.</text:p>
      <text:p text:style-name="P2"/>
      <text:p text:style-name="P2">Pe vremuri lumea lupta pentru dreptate. Astazi lumea vrea sa aiba dreptate.</text:p>
      <text:p text:style-name="P2">Arthur Schopenhauer – Arta de a avea mereu dreptate.</text:p>
      <text:p text:style-name="P2"><text:tab/>( Eminescu a fost influentat de Schopenhauer )</text:p>
      <text:p text:style-name="P2"/>
      <text:p text:style-name="P2">Nichita Stanescu - “ In dragoste, cine are mereu dreptate, ramane singur”</text:p>
      <text:p text:style-name="P2">Ce preferi? O relatie sanatoasa, fericita? Sau sa ai mereu dreptate?</text:p>
      <text:p text:style-name="P2"/>
      <text:p text:style-name="P2">Este foarte periculos sa comunicam cu noi insine. </text:p>
      <text:p text:style-name="P2">Internetul este cea mai mare inventia a narcisismului modern.</text:p>
      <text:p text:style-name="P2">Ce ne place, observam. Ce nu ne convine, dam la o parte, contemplandu-ne pe noi insine.</text:p>
      <text:p text:style-name="P2">De aceea ne este greu sa evoluam, ramanand in aceleasi paradigme, aceleasi optiuni.</text:p>
      <text:p text:style-name="P2"/>
      <text:p text:style-name="P2">Sa gandesti global si sa actionezi local. ( GANDIM GLOBAL, ACTIONAM LOCAL).</text:p>
      <text:p text:style-name="P2"/>
      <text:p text:style-name="P3">Intr-o viata obisnuita, de-a lungul vietii, putem influenta undeva la 10 000 de oameni.</text:p>
      <text:p text:style-name="P3">Pentru a intelege ce se intampla la nivel local, trebuie sa observi ce se intampla pe glob.</text:p>
      <text:p text:style-name="P3"/>
      <text:p text:style-name="P3">Ex: In Canada anul asta au avut probleme cu cresterea soia =&gt; companiile au crescut la bursa</text:p>
      <text:p text:style-name="P3">=&gt; Romania care vinde rapita are de castigat.</text:p>
      <text:p text:style-name="P3">Pentru a intelege situatiile locale, trebuie sa te uiti la cele globale.</text:p>
      <text:p text:style-name="P3"/>
      <text:p text:style-name="P3">Sec XX a fost cel mai oribil secol al lumii, 2 razboaie mondiale, un holocaust si un gulag (corespondent Holocaust-ului).</text:p>
      <text:p text:style-name="P3">Holocaust ← Nazisti. (evrei, romi) prin gazare si exterminare.</text:p>
      <text:p text:style-name="P3">Gulag ← Rusi. Exterminati prin munca pana la extenuare.</text:p>
      <text:p text:style-name="P3">=&gt; MILIOANE DE OAMENI MORTI PENTRU NISTE ADEVARURI.</text:p>
      <text:p text:style-name="P3"/>
      <text:p text:style-name="P3">“Adevaruri” create de ai, propagate prin propaganda, folosind niste ideologii pe care ei le considerau justificate:</text:p>
      <text:p text:style-name="P3"/>
      <text:p text:style-name="P3">→ Nazistii: rasismul, rasa ariana, superioara celorlalte.</text:p>
      <text:p text:style-name="P3">→ Th. Spatiului vital.</text:p>
      <text:p text:style-name="P3">→ Rusii: construiau raiul pe pamant =&gt; in numele acestui bine major, putem face si niste crime. </text:p>
      <text:p text:style-name="P3">Stalin “Ca sa faci omleta, trebuie sa spargi niste oua.”</text:p>
      <text:p text:style-name="P3">Comunistii romani erau Stalinisti.</text:p>
      <text:p text:style-name="P3"><text:s/></text:p>
      <text:p text:style-name="P3"/>
      <text:p text:style-name="P3"/>
      <text:p text:style-name="P3"><text:soft-page-break/>Oamenii sunt satui sa auda adevaruri, de aceea exista astazi teorii conspirationale.</text:p>
      <text:p text:style-name="P3">Firea omeneasca nu poate trai in necertitudine, de aceea mereu cauta ce nu intelege.</text:p>
      <text:p text:style-name="P3"/>
      <text:p text:style-name="P3">Wishful thinking -ul americanilor (a gandi pentru a-ti satisface dorintele proprii), capacitatea de a fenta realitatea pentru a gasi ceva mai placut, perceptia este intotdeauna mai puternica decat realitatea.</text:p>
      <text:p text:style-name="P3"/>
      <text:p text:style-name="P4">1992 – “Noi ca popor liber, am ales in cunostinta de cauza sa traim in lumea post-adevarului. Nu ne mai intereseaza argumentele rationale, preferam argumentele emotionale.”</text:p>
      <text:p text:style-name="P4"/>
      <text:p text:style-name="P4">Ortodoxa – Parere dreapta</text:p>
      <text:p text:style-name="P4">Episteme – Cunostinta adevarata.</text:p>
      <text:p text:style-name="P4">Narcisism cognitiv, nevoie de integritate psihica, fizica, ce tine de instinctul de supravietuire.</text:p>
      <text:p text:style-name="P4">Egocentrism = vedem lumea din perspectiva eului nostru, o evaluam doar din eul nostru, ne place, nu ne place, proiectand propriile trairi, sentimente, asupra lumii”.</text:p>
      <text:p text:style-name="P4"/>
      <text:p text:style-name="P4">“Urat e batranul care imbatraneste prost”</text:p>
      <text:p text:style-name="P4">Mizantropie – ura pentru oameni.</text:p>
      <text:p text:style-name="P4">Daca trebuie sa ai mereu dreptate, e alegerea ta de a fi nefericit toata viata. Ura ne mananca, ne roade, ne face nefericiti in permanenta.</text:p>
      <text:p text:style-name="P4"/>
      <text:p text:style-name="P4">Cei care invidiaza, nu sunt capabili de admiratie. Te-ai vrea in locul celuilalt.</text:p>
      <text:p text:style-name="P4"/>
      <text:p text:style-name="P4">Cand nu mai exista autoritati la care sa apelam, din cauza egocentrismului.</text:p>
      <text:p text:style-name="P4">Omul nu mai are respectul pentru oamenii cu studii, pentru oamenii cu cunostinta.</text:p>
      <text:p text:style-name="P4"/>
      <text:p text:style-name="P4">Toapa care a ajuns cu bani, se uita cu dispret la profesoara copiilor ei, nu ascultati profesorii fiindca ajungeti ca ei.</text:p>
      <text:p text:style-name="P4"/>
      <text:p text:style-name="P4">Magistratul a ajuns corupt. Condamnari anulate, desfiintate.</text:p>
      <text:p text:style-name="P4">In momentul in care nu mai ai pe cine sa intrebi (instanta cognitiva =&gt; cineva care stie despre ce e vorba), oamenii devin violenti.</text:p>
      <text:p text:style-name="P4"/>
      <text:p text:style-name="P5">In ziua de astazi traim intr-o mare ruptura, ruptura intre valul vechi si cel lor. Intre civilizatia industriala si civilizatia informationala. O serie intreaga de rupturi ce exista in societatea noastra. Rupturi si noi realitati pe care oamenii nu le pot intelege.</text:p>
      <text:p text:style-name="P5"/>
      <text:p text:style-name="P5">Cum putem fi deasupra valului?</text:p>
      <text:p text:style-name="P5">Cand om invata sa digitalizam totul, vom putea trece in urmatoarea era.</text:p>
      <text:p text:style-name="P5">Prof. Considera ca exista studenti care nu au citit o carte fizica pana acum, ci doar in digitalizare.</text:p>
      <text:p text:style-name="P5">Cei din 2000+ sunt deja nativi. Parintii nu inteleg deoarece nu se pot tine dupa copiii lor, li s-a bagat in cap ca un copil are mereu de invatat de la parinte, dar in ziua de astazi, parintii trebuie sa invete de la copiii deoarece nu fac parte din era informationala.</text:p>
      <text:p text:style-name="P5"/>
      <text:p text:style-name="P5">Considerati ca noile generatii sunt mai violente?</text:p>
      <text:p text:style-name="P5">Nu, cred ca exista anumite lucruri in schimb unde sunt mai intepati, de exemplu, cand vine vorba de drepturile lor, acest lucru ma bucura, deoarece, eu cand eram in facultate.</text:p>
      <text:p text:style-name="P5"/>
      <text:p text:style-name="P5">Orice om vrea sa fie actual, mai ales in tinerete!!</text:p>
      <text:p text:style-name="P5"/>
      <text:p text:style-name="P5">- - - - --</text:p>
      <text:p text:style-name="P5"/>
      <text:p text:style-name="P6"><text:soft-page-break/>Degeaba faci bani daca iti pierzi sufletul, nu mai stii pentru ce sa traiesti.</text:p>
      <text:p text:style-name="P6"/>
      <text:p text:style-name="P6">Caracterul este destinul omului – actiuni repetate =&gt; <text:s/>devin obiceiuri =&gt; devin caracterul tau =&gt; caracterul iti da un destin.</text:p>
      <text:p text:style-name="P6"/>
      <text:p text:style-name="P6"/>
      <text:p text:style-name="P4">- <text:span text:style-name="T1">nu banii.</text:span></text:p>
      <text:p text:style-name="P4">- <text:span text:style-name="T1">nu faima.</text:span></text:p>
      <text:p text:style-name="P4">- <text:span text:style-name="T1">nu frumusetea.</text:span></text:p>
      <text:p text:style-name="P4">- <text:span text:style-name="T1">nu inteligenta.</text:span></text:p>
      <text:p text:style-name="P4"/>
      <text:p text:style-name="P4">doxa – parere/ credinta</text:p>
      <text:p text:style-name="P4"/>
      <text:p text:style-name="P6">Sfat: aveti grija ce acte repetati, ce devine obicei pentru tine. </text:p>
      <text:p text:style-name="P6">Ex: consumul de pornografie, consumul de droguri.</text:p>
      <text:p text:style-name="P6"/>
      <text:p text:style-name="P6">Transformarea unor fapte daunatoare sau nefolositoare in obiceiuri =&gt; formeaza caracter =&gt; formeaza destinul.</text:p>
      <text:p text:style-name="P6"/>
      <text:p text:style-name="P6">Ia-ti viata in propriile maini.</text:p>
      <text:p text:style-name="P6"/>
      <text:p text:style-name="P6">Your personality creates your personal reality. ! ! !</text:p>
      <text:p text:style-name="P6"/>
      <text:p text:style-name="P6">Tipuri de oameni/ caractere de care ar trebui sa ne ferim?</text:p>
      <text:p text:style-name="P6">- Cei care vor sa aiba mereu dreptate. Ocolitii</text:p>
      <text:p text:style-name="P6">- Narcisistul devine violent in momentul in care il contrazici.</text:p>
      <text:p text:style-name="P6">- Atentia pentru narcisist este ca mancarea.</text:p>
      <text:p text:style-name="P6"/>
      <text:p text:style-name="P6">Exista o forma de narcisism sanatoasa?</text:p>
      <text:p text:style-name="P6">- Nu cultiva narcisismul copilului. =&gt; parinte slab care ii hraneste narcisismul.</text:p>
      <text:p text:style-name="P6">- </text:p>
      <text:p text:style-name="P6"/>
      <text:p text:style-name="P6">In scoala, caracterizarea personajului ar trebui sa ne invete ca oameni sa putem caracteriza corect alti oameni.</text:p>
      <text:p text:style-name="P7">Nu poti caracteriza un om atunci cand ii pui etichete.</text:p>
      <text:p text:style-name="P7"/>
      <text:p text:style-name="P7">TREBUIE sa invatam cum sa spunem adevarul fara sa il jignim pe acesta.</text:p>
      <text:p text:style-name="P7"/>
      <text:p text:style-name="P7">Mereu sa ai grija cum sa comunici. Cursuri de comunicare asertiva.</text:p>
      <text:p text:style-name="P7"/>
      <text:p text:style-name="P7">COMUNICARE ASERTIVA: comunica facand afirmati dar fiind pozitiv, fara sa te legi personal de om, NU GENERALIZA. </text:p>
      <text:p text:style-name="P7"/>
      <text:p text:style-name="P7">ASSERTION = afirmatie.</text:p>
      <text:p text:style-name="P7"/>
      <text:p text:style-name="P7">Cum te afirmi atunci cand cei din jur au lipsa asupra subiectului.</text:p>
      <text:p text:style-name="P7"/>
      <text:p text:style-name="P7">Ex: Cum explici religia ta cand ceilalti din jur au alta religie.</text:p>
      <text:p text:style-name="P7"/>
      <text:p text:style-name="P7">+ nu promite ce nu poti face.</text:p>
      <text:p text:style-name="P7"/>
      <text:p text:style-name="P7"/>
      <text:p text:style-name="P7"><text:soft-page-break/>5 reguli cunoscute in Oxford (1980)</text:p>
      <text:p text:style-name="P7"/>
      <text:p text:style-name="P7">- Nu ne legam de obiectele si apartinatori celor cu care avem un conflict.</text:p>
      <text:p text:style-name="P7">- Discuta ideile pentru a ajunge la adevar.</text:p>
      <text:p text:style-name="P7"/>
      <text:p text:style-name="P7"/>
      <text:p text:style-name="P7">Asisti la o cearta intre 2 si iti e rusine de amandoi, nu ai cum sa ii impaci. Fiecare dintre ei este o varianta unilaterala a adevarului. Fiecare are o parte de adevar dar nu vad ansamblul. Fiecare vede doar o fata a adevarului si ar trebui sa o vada si pe a celuilalt.</text:p>
      <text:p text:style-name="P7"/>
      <text:p text:style-name="P8">80% din personalul de comunicare sunt femei. =&gt; femeile sunt foarte bune comunicatoare.</text:p>
      <text:p text:style-name="P8">Daca femeia nu si-a facut ratia verbala, sa va asteptati sa va povesteasca.</text:p>
      <text:p text:style-name="P8">Rolul barbatului este sa va ascultati, pentru a-si face ele ordine in minte.</text:p>
      <text:p text:style-name="P8"/>
      <text:p text:style-name="P8">Narcisistul mereu are o parere, vine in ajutor pentru a-i arata cum se face, in loc sa ASCULTE.</text:p>
      <text:p text:style-name="P8">Femeia se vrea ascultata, nu consiliata. Daca o asculti ea se simte iubita.</text:p>
      <text:p text:style-name="P8"/>
      <text:p text:style-name="P8">RESPECTATI-L PE CELALALT ! EL ESTE OGLINDA NOASTRA.</text:p>
      <text:p text:style-name="P8">In functie de cum ne priveste, cum ne raspunde, cum se comporta, ne fac sa stim cine suntem…..</text:p>
      <text:p text:style-name="P8"/>
      <text:p text:style-name="P8">Iisus – “Iubiti-va intre voi asa cum v-am iubit eu”</text:p>
      <text:p text:style-name="P8"/>
      <text:p text:style-name="P8">CONTACTUL VIZUAL SI ZAMBETUL. PUNE-TI LA DISPOZITIE UMANITATEA TA PENTRU A-L AJUTA PE CELALALT.</text:p>
      <text:p text:style-name="P8"/>
      <text:p text:style-name="P8"/>
      <text:p text:style-name="P8">80% din personalul de management sunt barbati.</text:p>
      <text:p text:style-name="P8"/>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3:26:46.108458466</meta:creation-date>
    <meta:generator>LibreOffice/7.3.7.2$Linux_X86_64 LibreOffice_project/30$Build-2</meta:generator>
    <dc:date>2023-08-15T15:30:37.332697833</dc:date>
    <meta:editing-duration>PT7M45S</meta:editing-duration>
    <meta:editing-cycles>1</meta:editing-cycles>
    <meta:document-statistic meta:table-count="0" meta:image-count="0" meta:object-count="0" meta:page-count="4" meta:paragraph-count="99" meta:word-count="1201" meta:character-count="7250" meta:non-whitespace-character-count="6127"/>
  </office:meta>
</office:document-meta>
</file>